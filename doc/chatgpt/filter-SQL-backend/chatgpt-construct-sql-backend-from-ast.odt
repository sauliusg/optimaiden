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1" manifest:media-type=""/>
  <manifest:file-entry manifest:full-path="settings.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Hindi1" svg:font-family="'Lohit Hind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erif CJK SC" svg:font-family="'Noto Serif CJK SC'"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Preformatted_20_Text">
      <style:paragraph-properties fo:margin-top="0in" fo:margin-bottom="0.1965in" loext:contextual-spacing="false"/>
    </style:style>
    <style:style style:name="P2" style:family="paragraph" style:parent-style-name="Text_20_body" style:list-style-name="L1"/>
    <style:style style:name="P3" style:family="paragraph" style:parent-style-name="Text_20_body" style:list-style-name="L3"/>
    <style:style style:name="P4" style:family="paragraph" style:parent-style-name="Text_20_body" style:list-style-name="L4"/>
    <style:style style:name="P5" style:family="paragraph" style:parent-style-name="Text_20_body">
      <style:text-properties officeooo:rsid="0009072d" officeooo:paragraph-rsid="0009072d"/>
    </style:style>
    <style:style style:name="P6" style:family="paragraph" style:parent-style-name="Text_20_body">
      <style:paragraph-properties fo:margin-top="0in" fo:margin-bottom="0in" loext:contextual-spacing="false"/>
      <style:text-properties officeooo:paragraph-rsid="000c30aa"/>
    </style:style>
    <style:style style:name="fr1" style:family="graphic" style:parent-style-name="OLE">
      <style:graphic-properties fo:margin-left="0in" fo:margin-right="0in" fo:margin-top="0in" fo:margin-bottom="0in" style:wrap="run-through" style:number-wrapped-paragraphs="no-limit" style:vertical-pos="from-top" style:vertical-rel="page" style:horizontal-pos="from-left" style:horizontal-rel="paragraph" fo:padding="0in" fo:border="none" draw:ole-draw-aspect="1"/>
    </style:style>
    <style:style style:name="Sect1" style:family="section">
      <style:section-properties fo:margin-left="0in" fo:margin-right="0in" style:editable="false">
        <style:columns fo:column-count="1" fo:column-gap="0in"/>
      </style:section-properties>
    </style:style>
    <style:style style:name="Sect2" style:family="section">
      <style:section-properties style:writing-mode="lr-tb" fo:margin-left="0in" fo:margin-right="0in"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form:form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Object1" text:anchor-type="page" text:anchor-page-number="1" svg:x="0in" svg:y="0in" svg:width="0.0161in" svg:height="0.0161in" draw:z-index="0">
        <draw:floating-frame/>
      </draw:frame>
      <text:p text:style-name="Text_20_body"><text:a xlink:type="simple" xlink:href="https://chatgpt.com/" text:style-name="Internet_20_link" text:visited-style-name="Visited_20_Internet_20_Link">https://chatgpt.com/</text:a></text:p>
      <text:p text:style-name="Text_20_body">2026-06-28T11:37+03:00</text:p>
      <text:p text:style-name="P5">Anonymous chat.</text:p>
      <text:p text:style-name="Standard"/>
      <text:list xml:id="list1315530191" text:style-name="L1">
        <text:list-item>
          <text:p text:style-name="P2"/>
        </text:list-item>
      </text:list>
      <text:list xml:id="list1580223797" text:style-name="L3">
        <text:list-item>
          <text:p text:style-name="P3">Get responses tailored to you</text:p>
        </text:list-item>
      </text:list>
      <text:p text:style-name="Text_20_body">Log in to get answers based on saved chats, plus create images and upload files.</text:p>
      <text:section text:style-name="Sect1" text:name="thread">
        <text:p text:style-name="Text_20_body"/>
      </text:section>
      <text:section text:style-name="Sect1" text:name="_r_18_">
        <text:p text:style-name="P6">I am working on an Ada server implementation of the OPTIMADE (https://github.com/Materials-Consortia/OPTIMADE/blob/master/optimade.rst) specification of materials science data exchange protocol. One of the essential ingredients of the OPTIMADE standard is the Filter language, which permits clients to select entries that they are interested in when formulating OPTIMADE REST queries. The OPTIMADE itself tries to be backend-agnostic, but one of the possible engines that the server could use is SQL. I am now implementing the Filter language parser and query generator in Ada, to be included into the final Ada server. I successfully used ayacc and aflex to generate the parser and the lexer, and the resulting packages now generate the Abstract Syntax Tree (AST) representing the OPTIMADE Filter queries. The Ada package specification for the AS is given bellow: </text:p>
        <text:p text:style-name="P6"/>
        <text:p text:style-name="P6"><text:s/>with Ada.Strings.Unbounded; use Ada.Strings.Unbounded;</text:p>
        <text:p text:style-name="P6"/>
        <text:p text:style-name="P6">with Ada.Finalization;</text:p>
        <text:p text:style-name="P6"/>
        <text:p text:style-name="P6">-- Abstract Syntax Tree (AST) for the OPTIMADE Filter language.</text:p>
        <text:p text:style-name="P6">--</text:p>
        <text:p text:style-name="P6">-- Loosely based on the example in:</text:p>
        <text:p text:style-name="P6">--</text:p>
        <text:p text:style-name="P6">-- https://www.cs.fsu.edu/~baker/ada/examples/ast2.ads</text:p>
        <text:p text:style-name="P6"/>
        <text:p text:style-name="P6">package Filter_AST is</text:p>
        <text:p text:style-name="P6"><text:s text:c="3"/></text:p>
        <text:p text:style-name="P6"><text:s text:c="3"/>type Operator_Type is ('+', '-', '=', ':', ',', '&lt;', '&gt;', '.', OP_GE,</text:p>
        <text:p text:style-name="P6"><text:s text:c="26"/>OP_LE, OP_NE, OP_AND, OP_OR, OP_NOT, OP_HAS_ALL,</text:p>
        <text:p text:style-name="P6"><text:s text:c="26"/>OP_HAS_ANY, OP_HAS_ONLY, OP_IS_KNOWN,</text:p>
        <text:p text:style-name="P6"><text:s text:c="26"/>OP_IS_UNKNOWN, OP_LENGTH, OP_CONTAINS,</text:p>
        <text:p text:style-name="P6"><text:s text:c="26"/>OP_STARTS_WITH, OP_ENDS_WITH,</text:p>
        <text:p text:style-name="P6"><text:s text:c="26"/>'!', '?'</text:p>
        <text:p text:style-name="P6"><text:s text:c="25"/>);</text:p>
        <text:p text:style-name="P6"><text:s text:c="3"/></text:p>
        <text:p text:style-name="P6"><text:s text:c="3"/>type AST_Kind is (NUMBER, TEXT, TRUE_OR_FALSE, VARIABLE, OPERATOR,</text:p>
        <text:p text:style-name="P6"><text:s text:c="21"/>UNARY_OPERATOR);</text:p>
        <text:p text:style-name="P6"><text:s text:c="3"/></text:p>
        <text:p text:style-name="P6"><text:s text:c="3"/>type AST_Type is private;</text:p>
        <text:p text:style-name="P6"><text:s text:c="3"/></text:p>
        <text:p text:style-name="P6"><text:s text:c="3"/>-- Return the AST kind:</text:p>
        <text:p text:style-name="P6"><text:s text:c="3"/>function Kind (A : AST_Type) return AST_Kind;</text:p>
        <text:p text:style-name="P6"><text:s text:c="3"/></text:p>
        <text:p text:style-name="P6"><text:soft-page-break/><text:s text:c="3"/>-- Return empty AST, to be used as a placeholder:</text:p>
        <text:p text:style-name="P6"><text:s text:c="3"/>function Null_AST return AST_Type;</text:p>
        <text:p text:style-name="P6"><text:s text:c="3"/></text:p>
        <text:p text:style-name="P6"><text:s text:c="3"/>-- Check whether the AST has not node (and thus pepresents an empty</text:p>
        <text:p text:style-name="P6"><text:s text:c="3"/>-- <text:s/>dummy node):</text:p>
        <text:p text:style-name="P6"><text:s text:c="3"/>function Is_Null (A : AST_Type) return Boolean;</text:p>
        <text:p text:style-name="P6"><text:s text:c="3"/></text:p>
        <text:p text:style-name="P6"><text:s text:c="3"/>-- Return left and right subtree of an expression:</text:p>
        <text:p text:style-name="P6"><text:s text:c="3"/>function Left (A : AST_Type) return AST_Type;</text:p>
        <text:p text:style-name="P6"><text:s text:c="3"/></text:p>
        <text:p text:style-name="P6"><text:s text:c="3"/>function Right (A : AST_Type) return AST_Type;</text:p>
        <text:p text:style-name="P6"><text:s text:c="3"/></text:p>
        <text:p text:style-name="P6"><text:s text:c="3"/>-- Return the operand of an unary expression:</text:p>
        <text:p text:style-name="P6"><text:s text:c="3"/>function Operand (A : AST_Type) return AST_Type;</text:p>
        <text:p text:style-name="P6"><text:s text:c="3"/></text:p>
        <text:p text:style-name="P6"><text:s text:c="3"/>-- Return the operator of a binary operator AST node:</text:p>
        <text:p text:style-name="P6"><text:s text:c="3"/>function Operator (A : AST_Type) return Operator_Type;</text:p>
        <text:p text:style-name="P6"><text:s text:c="3"/></text:p>
        <text:p text:style-name="P6"><text:s text:c="3"/>-- <text:s/>Construct AST leaf representing a variable (i.e. an OPTIMADE</text:p>
        <text:p text:style-name="P6"><text:s text:c="3"/>-- <text:s/>property):</text:p>
        <text:p text:style-name="P6"><text:s text:c="3"/>function New_AST_Identifier (Name : String) return AST_Type;</text:p>
        <text:p text:style-name="P6"><text:s text:c="2"/></text:p>
        <text:p text:style-name="P6"><text:s text:c="3"/>function New_AST_Identifier (Name : Unbounded_String) return AST_Type;</text:p>
        <text:p text:style-name="P6"><text:s text:c="2"/></text:p>
        <text:p text:style-name="P6"><text:s text:c="3"/>-- <text:s/>Construct AST leaf representing a string value:</text:p>
        <text:p text:style-name="P6"><text:s text:c="3"/>function New_AST (Value : String) return AST_Type;</text:p>
        <text:p text:style-name="P6"><text:s text:c="2"/></text:p>
        <text:p text:style-name="P6"><text:s text:c="3"/>function New_AST (Value : Unbounded_String) return AST_Type;</text:p>
        <text:p text:style-name="P6"><text:s text:c="2"/></text:p>
        <text:p text:style-name="P6"><text:s text:c="3"/>-- <text:s/>Construct AST leaf representing a numeric constant:</text:p>
        <text:p text:style-name="P6"><text:s text:c="3"/>function New_AST (X : Float) return AST_Type;</text:p>
        <text:p text:style-name="P6"/>
        <text:p text:style-name="P6"><text:s text:c="3"/>-- <text:s/>Construct AST leaf True and False values:</text:p>
        <text:p text:style-name="P6"><text:s text:c="3"/>function New_AST (B : Boolean) return AST_Type;</text:p>
        <text:p text:style-name="P6"/>
        <text:p text:style-name="P6"><text:s text:c="3"/>-- <text:s/>Construct AST node for unary operator:</text:p>
        <text:p text:style-name="P6"><text:s text:c="3"/>function New_AST (Op : Operator_Type; Arg : AST_Type) return AST_Type;</text:p>
        <text:p text:style-name="P6"><text:s text:c="3"/></text:p>
        <text:p text:style-name="P6"><text:s text:c="3"/>-- <text:s/>Construct AST node for binary operator:</text:p>
        <text:p text:style-name="P6"><text:s text:c="3"/>function New_AST (Op : Operator_Type; Arg1, Arg2 : AST_Type) return AST_Type;</text:p>
        <text:p text:style-name="P6"><text:s text:c="3"/></text:p>
        <text:p text:style-name="P6"><text:s text:c="3"/>-- <text:s/>Represent AST as a Lisp-style parenthesized expression:</text:p>
        <text:p text:style-name="P6"><text:s text:c="3"/>function Image (T : AST_Type) return String;</text:p>
        <text:p text:style-name="P6"><text:s text:c="3"/></text:p>
        <text:p text:style-name="P6">private</text:p>
        <text:p text:style-name="P6"><text:s text:c="3"/></text:p>
        <text:p text:style-name="P6"><text:s text:c="3"/>type AST_Node_Type (Kind : AST_Kind) is record</text:p>
        <text:p text:style-name="P6"><text:s text:c="6"/>Count : Integer := 1;</text:p>
        <text:p text:style-name="P6"><text:s text:c="6"/>case Kind is</text:p>
        <text:p text:style-name="P6"><text:soft-page-break/><text:s text:c="9"/>when NUMBER =&gt;</text:p>
        <text:p text:style-name="P6"><text:s text:c="12"/>Value : Float;</text:p>
        <text:p text:style-name="P6"><text:s text:c="9"/>when TEXT =&gt;</text:p>
        <text:p text:style-name="P6"><text:s text:c="12"/>Text_Value : Unbounded_String;</text:p>
        <text:p text:style-name="P6"><text:s text:c="9"/>when TRUE_OR_FALSE =&gt;</text:p>
        <text:p text:style-name="P6"><text:s text:c="12"/>Bool_Value : Boolean;</text:p>
        <text:p text:style-name="P6"><text:s text:c="9"/>when VARIABLE =&gt;</text:p>
        <text:p text:style-name="P6"><text:s text:c="12"/>Identifier : Unbounded_String;</text:p>
        <text:p text:style-name="P6"><text:s text:c="9"/>when OPERATOR =&gt;</text:p>
        <text:p text:style-name="P6"><text:s text:c="12"/>Op : Operator_Type;</text:p>
        <text:p text:style-name="P6"><text:s text:c="12"/>Left, Right : AST_Type;</text:p>
        <text:p text:style-name="P6"><text:s text:c="9"/>when UNARY_OPERATOR =&gt;</text:p>
        <text:p text:style-name="P6"><text:s text:c="12"/>UnOp <text:s text:c="3"/>: Operator_Type;</text:p>
        <text:p text:style-name="P6"><text:s text:c="12"/>Operand : AST_Type;</text:p>
        <text:p text:style-name="P6"><text:s text:c="6"/>end case;</text:p>
        <text:p text:style-name="P6"><text:s text:c="3"/>end record;</text:p>
        <text:p text:style-name="P6"><text:s text:c="3"/></text:p>
        <text:p text:style-name="P6"><text:s text:c="3"/>type AST_Node_Access is access AST_Node_Type;</text:p>
        <text:p text:style-name="P6"><text:s text:c="3"/></text:p>
        <text:p text:style-name="P6"><text:s text:c="3"/>type AST_Type is new Ada.Finalization.Controlled with record</text:p>
        <text:p text:style-name="P6"><text:s text:c="6"/>AST : AST_Node_Access := null;</text:p>
        <text:p text:style-name="P6"><text:s text:c="3"/>end record;</text:p>
        <text:p text:style-name="P6"><text:s text:c="3"/></text:p>
        <text:p text:style-name="P6"><text:s text:c="3"/>-- <text:s/>don't need to override Initialize, since null value</text:p>
        <text:p text:style-name="P6"><text:s text:c="3"/>-- <text:s/>is OK for AST_Type.AST</text:p>
        <text:p text:style-name="P6"><text:s text:c="3"/>procedure Adjust (T : in out AST_TYpe); <text:s text:c="2"/></text:p>
        <text:p text:style-name="P6"><text:s text:c="3"/>procedure Finalize (T : in out AST_Type);</text:p>
        <text:p text:style-name="P6"><text:s text:c="3"/></text:p>
        <text:p text:style-name="P6">end;</text:p>
        <text:p text:style-name="P6"/>
        <text:p text:style-name="P6">Can you suggest a strategy, or generate Ada specs, or maybe even the implementation (.adb) code to translate this AST into an SQL query? You can assume that a backend SQL database has a table or tables with the necessary data, and the table structure can be adjusted for the convenience of the implementation (i.e. we are not constrained with any existing design). In the implementation, use the existing Ada MySQL binding packages. Start with the simplest case of scalar properties (the more complicated ZIP requests can be left for next iteration); at the moment I am most of all interested in a modular and extensible Ada code that would translate comparison operators and boolean logic of the Filter language.</text:p>
      </text:section>
      <text:p text:style-name="Text_20_body"/>
      <text:p text:style-name="Text_20_body">I think the cleanest architecture is <text:span text:style-name="Strong_20_Emphasis">not</text:span> to have the AST generate SQL directly.</text:p>
      <text:p text:style-name="Text_20_body">Instead, treat SQL as just one backend. Today you have MySQL, tomorrow PostgreSQL, SQLite, MongoDB, ElasticSearch, or even an in-memory evaluator. The AST should remain completely unaware of SQL.</text:p>
      <text:p text:style-name="Text_20_body">I'd structure it approximately like this:</text:p>
      <text:section text:style-name="Sect2" text:name="code-block-viewer">
        <text:p text:style-name="Preformatted_20_Text"><text:span text:style-name="Source_20_Text"><text:s text:c="16"/>aflex/ayacc</text:span></text:p>
        <text:p text:style-name="Preformatted_20_Text"><text:span text:style-name="Source_20_Text"><text:s text:c="21"/>│</text:span></text:p>
        <text:p text:style-name="Preformatted_20_Text"><text:span text:style-name="Source_20_Text"><text:s text:c="21"/>▼</text:span></text:p>
        <text:p text:style-name="Preformatted_20_Text"><text:span text:style-name="Source_20_Text"><text:s text:c="14"/>Filter_AST (immutable)</text:span></text:p>
        <text:p text:style-name="Preformatted_20_Text"><text:soft-page-break/><text:span text:style-name="Source_20_Text"><text:s text:c="21"/>│</text:span></text:p>
        <text:p text:style-name="Preformatted_20_Text"><text:span text:style-name="Source_20_Text"><text:s text:c="21"/>▼</text:span></text:p>
        <text:p text:style-name="Preformatted_20_Text"><text:span text:style-name="Source_20_Text"><text:s text:c="9"/>Filter_Semantics (optional)</text:span></text:p>
        <text:p text:style-name="Preformatted_20_Text"><text:span text:style-name="Source_20_Text"><text:s text:c="8"/>type checking / validation</text:span></text:p>
        <text:p text:style-name="Preformatted_20_Text"><text:span text:style-name="Source_20_Text"><text:s text:c="21"/>│</text:span></text:p>
        <text:p text:style-name="Preformatted_20_Text"><text:span text:style-name="Source_20_Text"><text:s text:c="21"/>▼</text:span></text:p>
        <text:p text:style-name="Preformatted_20_Text"><text:span text:style-name="Source_20_Text"><text:s text:c="10"/>Filter_Backend (abstract)</text:span></text:p>
        <text:p text:style-name="Preformatted_20_Text"><text:span text:style-name="Source_20_Text"><text:s text:c="13"/>▲ <text:s text:c="13"/>▲</text:span></text:p>
        <text:p text:style-name="Preformatted_20_Text"><text:span text:style-name="Source_20_Text"><text:s text:c="13"/>│ <text:s text:c="13"/>│</text:span></text:p>
        <text:p text:style-name="Preformatted_20_Text"><text:span text:style-name="Source_20_Text"><text:s text:c="6"/>Filter_SQL <text:s text:c="5"/>Filter_InMemory</text:span></text:p>
        <text:p text:style-name="Preformatted_20_Text"><text:span text:style-name="Source_20_Text"><text:s text:c="13"/>▲</text:span></text:p>
        <text:p text:style-name="Preformatted_20_Text"><text:span text:style-name="Source_20_Text"><text:s text:c="13"/>│</text:span></text:p>
        <text:p text:style-name="P1"><text:span text:style-name="Source_20_Text"><text:s text:c="5"/>Filter_MySQL_Dialect</text:span></text:p>
      </text:section>
      <text:p text:style-name="Text_20_body">The important observation is that an AST is already a backend-independent intermediate representation. Don't lose that advantage.</text:p>
      <text:p text:style-name="Horizontal_20_Line"/>
      <text:h text:style-name="Heading_20_1" text:outline-level="1">Step 1. Introduce a SQL representation</text:h>
      <text:p text:style-name="Text_20_body">I would <text:span text:style-name="Strong_20_Emphasis">not</text:span> generate one big SQL string.</text:p>
      <text:p text:style-name="Text_20_body">Instead, generate something like</text:p>
      <text:section text:style-name="Sect2" text:name="Section1">
        <text:p text:style-name="Preformatted_20_Text"><text:bookmark text:name="code-block-viewer"/><text:span text:style-name="Source_20_Text">type SQL_Query is record</text:span></text:p>
        <text:p text:style-name="Preformatted_20_Text"><text:span text:style-name="Source_20_Text"><text:s text:c="3"/>SQL : Unbounded_String;</text:span></text:p>
        <text:p text:style-name="Preformatted_20_Text"><text:span text:style-name="Source_20_Text"><text:s text:c="3"/>Parameters : Parameter_Vector;</text:span></text:p>
        <text:p text:style-name="P1"><text:span text:style-name="Source_20_Text">end record;</text:span></text:p>
      </text:section>
      <text:p text:style-name="Text_20_body">where</text:p>
      <text:section text:style-name="Sect2" text:name="Section2">
        <text:p text:style-name="P1"><text:bookmark text:name="code-block-viewer1"/><text:span text:style-name="Source_20_Text">chemical_formula = ?</text:span></text:p>
      </text:section>
      <text:p text:style-name="Text_20_body">is generated instead of</text:p>
      <text:section text:style-name="Sect2" text:name="Section3">
        <text:p text:style-name="P1"><text:bookmark text:name="code-block-viewer2"/><text:span text:style-name="Source_20_Text">chemical_formula = 'H2O'</text:span></text:p>
      </text:section>
      <text:p text:style-name="Text_20_body">This immediately solves</text:p>
      <text:list xml:id="list4179606354" text:style-name="L4">
        <text:list-item>
          <text:p text:style-name="P4">quoting</text:p>
        </text:list-item>
        <text:list-item>
          <text:p text:style-name="P4">escaping</text:p>
        </text:list-item>
        <text:list-item>
          <text:p text:style-name="P4">SQL injection</text:p>
        </text:list-item>
        <text:list-item>
          <text:p text:style-name="P4">NULL handling</text:p>
        </text:list-item>
        <text:list-item>
          <text:p text:style-name="P4">prepared statements</text:p>
        </text:list-item>
      </text:list>
      <text:p text:style-name="Text_20_body">For MySQL bindings this maps naturally onto prepared statements.</text:p>
      <text:p text:style-name="Text_20_body">Example:</text:p>
      <text:section text:style-name="Sect2" text:name="Section4">
        <text:p text:style-name="Preformatted_20_Text"><text:bookmark text:name="code-block-viewer3"/><text:span text:style-name="Source_20_Text">filter:</text:span></text:p>
        <text:p text:style-name="Preformatted_20_Text"><text:span text:style-name="Source_20_Text">elements HAS "Si"</text:span></text:p>
        <text:p text:style-name="Preformatted_20_Text"><text:span text:style-name="Source_20_Text">↓</text:span></text:p>
        <text:p text:style-name="Preformatted_20_Text"><text:span text:style-name="Source_20_Text">SQL:</text:span></text:p>
        <text:p text:style-name="Preformatted_20_Text"><text:span text:style-name="Source_20_Text">JSON_CONTAINS(elements, ?)</text:span></text:p>
        <text:p text:style-name="P1"><text:span text:style-name="Source_20_Text">parameter #1 = "Si"</text:span></text:p>
      </text:section>
      <text:p text:style-name="Horizontal_20_Line"><text:soft-page-break/></text:p>
      <text:h text:style-name="Heading_20_1" text:outline-level="1">Step 2. Introduce a backend interface</text:h>
      <text:p text:style-name="Text_20_body">Something like</text:p>
      <text:section text:style-name="Sect2" text:name="Section5">
        <text:p text:style-name="Preformatted_20_Text"><text:bookmark text:name="code-block-viewer4"/><text:span text:style-name="Source_20_Text">package Filter_Backend is</text:span></text:p>
        <text:p text:style-name="Preformatted_20_Text"><text:span text:style-name="Source_20_Text"><text:s text:c="3"/>type Backend is abstract tagged null record;</text:span></text:p>
        <text:p text:style-name="Preformatted_20_Text"><text:span text:style-name="Source_20_Text"><text:s text:c="3"/>function Compile</text:span></text:p>
        <text:p text:style-name="Preformatted_20_Text"><text:span text:style-name="Source_20_Text"><text:s text:c="6"/>(B <text:s text:c="2"/>: Backend;</text:span></text:p>
        <text:p text:style-name="Preformatted_20_Text"><text:span text:style-name="Source_20_Text"><text:s text:c="7"/>AST : Filter_AST.AST_Type)</text:span></text:p>
        <text:p text:style-name="Preformatted_20_Text"><text:span text:style-name="Source_20_Text"><text:s text:c="6"/>return SQL_Query is abstract;</text:span></text:p>
        <text:p text:style-name="P1"><text:span text:style-name="Source_20_Text">end Filter_Backend;</text:span></text:p>
      </text:section>
      <text:p text:style-name="Text_20_body">Then</text:p>
      <text:section text:style-name="Sect2" text:name="Section6">
        <text:p text:style-name="Preformatted_20_Text"><text:bookmark text:name="code-block-viewer5"/><text:span text:style-name="Source_20_Text">package Filter_Backend.MySQL</text:span></text:p>
        <text:p text:style-name="Preformatted_20_Text"><text:span text:style-name="Source_20_Text">package body Filter_Backend.MySQL</text:span></text:p>
        <text:p text:style-name="P1"><text:span text:style-name="Source_20_Text">package Filter_Backend.PostgreSQL</text:span></text:p>
      </text:section>
      <text:p text:style-name="Text_20_body">all become independent.</text:p>
      <text:p text:style-name="Horizontal_20_Line"/>
      <text:h text:style-name="Heading_20_1" text:outline-level="1">Step 3. Use recursive descent over the AST</text:h>
      <text:p text:style-name="Text_20_body">The compiler is almost embarrassingly recursive.</text:p>
      <text:p text:style-name="Text_20_body">Pseudo-code:</text:p>
      <text:section text:style-name="Sect2" text:name="Section7">
        <text:p text:style-name="Preformatted_20_Text"><text:bookmark text:name="code-block-viewer6"/><text:span text:style-name="Source_20_Text">function Compile_Node</text:span></text:p>
        <text:p text:style-name="Preformatted_20_Text"><text:span text:style-name="Source_20_Text"><text:s text:c="3"/>(Node : AST_Type)</text:span></text:p>
        <text:p text:style-name="Preformatted_20_Text"><text:span text:style-name="Source_20_Text">return SQL_Fragment</text:span></text:p>
        <text:p text:style-name="Preformatted_20_Text"><text:span text:style-name="Source_20_Text">is</text:span></text:p>
        <text:p text:style-name="Preformatted_20_Text"><text:span text:style-name="Source_20_Text">begin</text:span></text:p>
        <text:p text:style-name="Preformatted_20_Text"><text:span text:style-name="Source_20_Text"><text:s text:c="3"/>case Kind (Node) is</text:span></text:p>
        <text:p text:style-name="Preformatted_20_Text"><text:span text:style-name="Source_20_Text"><text:s text:c="6"/>when NUMBER =&gt;</text:span></text:p>
        <text:p text:style-name="Preformatted_20_Text"><text:span text:style-name="Source_20_Text"><text:s text:c="10"/>...</text:span></text:p>
        <text:p text:style-name="Preformatted_20_Text"><text:span text:style-name="Source_20_Text"><text:s text:c="6"/>when VARIABLE =&gt;</text:span></text:p>
        <text:p text:style-name="Preformatted_20_Text"><text:span text:style-name="Source_20_Text"><text:s text:c="10"/>...</text:span></text:p>
        <text:p text:style-name="Preformatted_20_Text"><text:span text:style-name="Source_20_Text"><text:s text:c="6"/>when OPERATOR =&gt;</text:span></text:p>
        <text:p text:style-name="Preformatted_20_Text"><text:span text:style-name="Source_20_Text"><text:s text:c="10"/>...</text:span></text:p>
        <text:p text:style-name="Preformatted_20_Text"><text:span text:style-name="Source_20_Text"><text:s text:c="3"/>end case;</text:span></text:p>
        <text:p text:style-name="P1"><text:span text:style-name="Source_20_Text">end;</text:span></text:p>
      </text:section>
      <text:p text:style-name="Text_20_body">Notice I said <text:span text:style-name="Strong_20_Emphasis">SQL_Fragment</text:span>, not String.</text:p>
      <text:p text:style-name="Horizontal_20_Line"/>
      <text:p text:style-name="Text_20_body">I'd define</text:p>
      <text:section text:style-name="Sect2" text:name="Section8">
        <text:p text:style-name="Preformatted_20_Text"><text:bookmark text:name="code-block-viewer7"/><text:span text:style-name="Source_20_Text">type SQL_Fragment is record</text:span></text:p>
        <text:p text:style-name="Preformatted_20_Text"><text:span text:style-name="Source_20_Text"><text:s text:c="3"/>Text : Unbounded_String;</text:span></text:p>
        <text:p text:style-name="Preformatted_20_Text"><text:span text:style-name="Source_20_Text"><text:s text:c="3"/>Parameters : Parameter_Vector;</text:span></text:p>
        <text:p text:style-name="P1"><text:span text:style-name="Source_20_Text">end record;</text:span></text:p>
      </text:section>
      <text:p text:style-name="Text_20_body"><text:soft-page-break/>Then each recursive call returns both SQL text and accumulated parameters.</text:p>
      <text:p text:style-name="Horizontal_20_Line"/>
      <text:h text:style-name="Heading_20_1" text:outline-level="1">Step 4. Variables become column names</text:h>
      <text:p text:style-name="Text_20_body">Suppose</text:p>
      <text:section text:style-name="Sect2" text:name="Section9">
        <text:p text:style-name="P1"><text:bookmark text:name="code-block-viewer8"/><text:span text:style-name="Source_20_Text">chemical_formula</text:span></text:p>
      </text:section>
      <text:p text:style-name="Text_20_body">exists in SQL.</text:p>
      <text:p text:style-name="Text_20_body">Then</text:p>
      <text:section text:style-name="Sect2" text:name="Section10">
        <text:p text:style-name="P1"><text:bookmark text:name="code-block-viewer9"/><text:span text:style-name="Source_20_Text">VARIABLE</text:span></text:p>
      </text:section>
      <text:p text:style-name="Text_20_body">becomes</text:p>
      <text:section text:style-name="Sect2" text:name="Section11">
        <text:p text:style-name="P1"><text:bookmark text:name="code-block-viewer10"/><text:span text:style-name="Source_20_Text">chemical_formula</text:span></text:p>
      </text:section>
      <text:p text:style-name="Text_20_body">after checking a lookup table.</text:p>
      <text:p text:style-name="Text_20_body">I would <text:span text:style-name="Strong_20_Emphasis">never</text:span> allow arbitrary identifiers to become SQL.</text:p>
      <text:p text:style-name="Text_20_body">Instead</text:p>
      <text:section text:style-name="Sect2" text:name="Section12">
        <text:p text:style-name="Preformatted_20_Text"><text:bookmark text:name="code-block-viewer11"/><text:span text:style-name="Source_20_Text">type Column_Info is record</text:span></text:p>
        <text:p text:style-name="Preformatted_20_Text"><text:span text:style-name="Source_20_Text"><text:s text:c="3"/>Optimade_Name : Unbounded_String;</text:span></text:p>
        <text:p text:style-name="Preformatted_20_Text"><text:span text:style-name="Source_20_Text"><text:s text:c="3"/>SQL_Name <text:s text:c="5"/>: Unbounded_String;</text:span></text:p>
        <text:p text:style-name="Preformatted_20_Text"><text:span text:style-name="Source_20_Text"><text:s text:c="3"/>Kind <text:s text:c="9"/>: Scalar_Type;</text:span></text:p>
        <text:p text:style-name="P1"><text:span text:style-name="Source_20_Text">end record;</text:span></text:p>
      </text:section>
      <text:p text:style-name="Text_20_body">Then</text:p>
      <text:section text:style-name="Sect2" text:name="Section13">
        <text:p text:style-name="Preformatted_20_Text"><text:bookmark text:name="code-block-viewer12"/><text:span text:style-name="Source_20_Text">elements</text:span></text:p>
        <text:p text:style-name="Preformatted_20_Text"><text:span text:style-name="Source_20_Text">↓</text:span></text:p>
        <text:p text:style-name="P1"><text:span text:style-name="Source_20_Text">properties.elements_json</text:span></text:p>
      </text:section>
      <text:p text:style-name="Text_20_body">or</text:p>
      <text:section text:style-name="Sect2" text:name="Section14">
        <text:p text:style-name="Preformatted_20_Text"><text:bookmark text:name="code-block-viewer13"/><text:span text:style-name="Source_20_Text">formula</text:span></text:p>
        <text:p text:style-name="Preformatted_20_Text"><text:span text:style-name="Source_20_Text">↓</text:span></text:p>
        <text:p text:style-name="P1"><text:span text:style-name="Source_20_Text">entries.formula</text:span></text:p>
      </text:section>
      <text:p text:style-name="Text_20_body">is controlled entirely by metadata.</text:p>
      <text:p text:style-name="Horizontal_20_Line"/>
      <text:h text:style-name="Heading_20_1" text:outline-level="1">Step 5. Constants become parameters</text:h>
      <text:p text:style-name="Text_20_body">Instead of</text:p>
      <text:section text:style-name="Sect2" text:name="Section15">
        <text:p text:style-name="P1"><text:bookmark text:name="code-block-viewer14"/><text:span text:style-name="Source_20_Text">3.14</text:span></text:p>
      </text:section>
      <text:p text:style-name="Text_20_body">becoming</text:p>
      <text:section text:style-name="Sect2" text:name="Section16">
        <text:p text:style-name="P1"><text:bookmark text:name="code-block-viewer15"/><text:span text:style-name="Source_20_Text">3.14</text:span></text:p>
      </text:section>
      <text:p text:style-name="Text_20_body"><text:soft-page-break/>generate</text:p>
      <text:section text:style-name="Sect2" text:name="Section17">
        <text:p text:style-name="P1"><text:bookmark text:name="code-block-viewer16"/><text:span text:style-name="Source_20_Text">?</text:span></text:p>
      </text:section>
      <text:p text:style-name="Text_20_body">and append</text:p>
      <text:section text:style-name="Sect2" text:name="Section18">
        <text:p text:style-name="P1"><text:bookmark text:name="code-block-viewer17"/><text:span text:style-name="Source_20_Text">3.14</text:span></text:p>
      </text:section>
      <text:p text:style-name="Text_20_body">to the parameter vector.</text:p>
      <text:p text:style-name="Text_20_body">Exactly the same for strings.</text:p>
      <text:p text:style-name="Horizontal_20_Line"/>
      <text:h text:style-name="Heading_20_1" text:outline-level="1">Step 6. Comparison operators</text:h>
      <text:p text:style-name="Text_20_body">This is extremely mechanical.</text:p>
      <text:section text:style-name="Sect2" text:name="Section19">
        <text:p text:style-name="Preformatted_20_Text"><text:bookmark text:name="code-block-viewer18"/><text:span text:style-name="Source_20_Text">AST:</text:span></text:p>
        <text:p text:style-name="Preformatted_20_Text"><text:span text:style-name="Source_20_Text"><text:s text:c="6"/>=</text:span></text:p>
        <text:p text:style-name="Preformatted_20_Text"><text:span text:style-name="Source_20_Text"><text:s text:c="5"/>/ \</text:span></text:p>
        <text:p text:style-name="P1"><text:span text:style-name="Source_20_Text"><text:s text:c="3"/>x <text:s text:c="3"/>3</text:span></text:p>
      </text:section>
      <text:p text:style-name="Text_20_body">becomes</text:p>
      <text:section text:style-name="Sect2" text:name="Section20">
        <text:p text:style-name="P1"><text:bookmark text:name="code-block-viewer19"/><text:span text:style-name="Source_20_Text">(x = ?)</text:span></text:p>
      </text:section>
      <text:p text:style-name="Text_20_body">Pseudo-code</text:p>
      <text:section text:style-name="Sect2" text:name="Section21">
        <text:p text:style-name="Preformatted_20_Text"><text:bookmark text:name="code-block-viewer20"/><text:span text:style-name="Source_20_Text">when '=' =&gt;</text:span></text:p>
        <text:p text:style-name="Preformatted_20_Text"><text:span text:style-name="Source_20_Text"><text:s text:c="3"/>return</text:span></text:p>
        <text:p text:style-name="Preformatted_20_Text"><text:span text:style-name="Source_20_Text"><text:s text:c="6"/>Left.Text</text:span></text:p>
        <text:p text:style-name="Preformatted_20_Text"><text:span text:style-name="Source_20_Text"><text:s text:c="6"/>&amp; " = "</text:span></text:p>
        <text:p text:style-name="P1"><text:span text:style-name="Source_20_Text"><text:s text:c="6"/>&amp; Right.Text;</text:span></text:p>
      </text:section>
      <text:p text:style-name="Text_20_body">where</text:p>
      <text:section text:style-name="Sect2" text:name="Section22">
        <text:p text:style-name="P1"><text:bookmark text:name="code-block-viewer21"/><text:span text:style-name="Source_20_Text">Right.Text</text:span></text:p>
      </text:section>
      <text:p text:style-name="Text_20_body">is just</text:p>
      <text:section text:style-name="Sect2" text:name="Section23">
        <text:p text:style-name="P1"><text:bookmark text:name="code-block-viewer22"/><text:span text:style-name="Source_20_Text">?</text:span></text:p>
      </text:section>
      <text:p text:style-name="Text_20_body">and carries the parameter.</text:p>
      <text:p text:style-name="Text_20_body">Likewise</text:p>
      <text:section text:style-name="Sect2" text:name="Section24">
        <text:p text:style-name="Preformatted_20_Text"><text:bookmark text:name="code-block-viewer23"/><text:span text:style-name="Source_20_Text">&lt;</text:span></text:p>
        <text:p text:style-name="Preformatted_20_Text"><text:span text:style-name="Source_20_Text">&gt;</text:span></text:p>
        <text:p text:style-name="Preformatted_20_Text"><text:span text:style-name="Source_20_Text">&lt;=</text:span></text:p>
        <text:p text:style-name="Preformatted_20_Text"><text:span text:style-name="Source_20_Text">&gt;=</text:span></text:p>
        <text:p text:style-name="P1"><text:span text:style-name="Source_20_Text">&lt;&gt;</text:span></text:p>
      </text:section>
      <text:p text:style-name="Horizontal_20_Line"/>
      <text:h text:style-name="Heading_20_1" text:outline-level="1"><text:soft-page-break/>Step 7. Boolean operators</text:h>
      <text:p text:style-name="Text_20_body">Again recursive.</text:p>
      <text:section text:style-name="Sect2" text:name="Section25">
        <text:p text:style-name="Preformatted_20_Text"><text:bookmark text:name="code-block-viewer24"/><text:span text:style-name="Source_20_Text">AND</text:span></text:p>
        <text:p text:style-name="Preformatted_20_Text"><text:span text:style-name="Source_20_Text">↓</text:span></text:p>
        <text:p text:style-name="P1"><text:span text:style-name="Source_20_Text">(left_sql) AND (right_sql)</text:span></text:p>
      </text:section>
      <text:p text:style-name="Text_20_body">For example</text:p>
      <text:section text:style-name="Sect2" text:name="Section26">
        <text:p text:style-name="Preformatted_20_Text"><text:bookmark text:name="code-block-viewer25"/><text:span text:style-name="Source_20_Text">(A AND B)</text:span></text:p>
        <text:p text:style-name="Preformatted_20_Text"><text:span text:style-name="Source_20_Text">↓</text:span></text:p>
        <text:p text:style-name="Preformatted_20_Text"><text:span text:style-name="Source_20_Text">(</text:span></text:p>
        <text:p text:style-name="Preformatted_20_Text"><text:span text:style-name="Source_20_Text"><text:s text:c="2"/>(A)</text:span></text:p>
        <text:p text:style-name="Preformatted_20_Text"><text:span text:style-name="Source_20_Text">AND</text:span></text:p>
        <text:p text:style-name="Preformatted_20_Text"><text:span text:style-name="Source_20_Text"><text:s text:c="2"/>(B)</text:span></text:p>
        <text:p text:style-name="P1"><text:span text:style-name="Source_20_Text">)</text:span></text:p>
      </text:section>
      <text:p text:style-name="Text_20_body">Similarly</text:p>
      <text:section text:style-name="Sect2" text:name="Section27">
        <text:p text:style-name="Preformatted_20_Text"><text:bookmark text:name="code-block-viewer26"/><text:span text:style-name="Source_20_Text">OR</text:span></text:p>
        <text:p text:style-name="Preformatted_20_Text"><text:span text:style-name="Source_20_Text">↓</text:span></text:p>
        <text:p text:style-name="P1"><text:span text:style-name="Source_20_Text">((...) OR (...))</text:span></text:p>
      </text:section>
      <text:p text:style-name="Horizontal_20_Line"/>
      <text:p text:style-name="Text_20_body">Unary NOT</text:p>
      <text:section text:style-name="Sect2" text:name="Section28">
        <text:p text:style-name="Preformatted_20_Text"><text:bookmark text:name="code-block-viewer27"/><text:span text:style-name="Source_20_Text">NOT x</text:span></text:p>
        <text:p text:style-name="Preformatted_20_Text"><text:span text:style-name="Source_20_Text">↓</text:span></text:p>
        <text:p text:style-name="P1"><text:span text:style-name="Source_20_Text">NOT (...)</text:span></text:p>
      </text:section>
      <text:p text:style-name="Horizontal_20_Line"/>
      <text:h text:style-name="Heading_20_1" text:outline-level="1">Step 8. A fragment type</text:h>
      <text:p text:style-name="Text_20_body">I would actually define</text:p>
      <text:section text:style-name="Sect2" text:name="Section29">
        <text:p text:style-name="Preformatted_20_Text"><text:bookmark text:name="code-block-viewer28"/><text:span text:style-name="Source_20_Text">package SQL is</text:span></text:p>
        <text:p text:style-name="Preformatted_20_Text"><text:span text:style-name="Source_20_Text"><text:s text:c="3"/>type SQL_Parameter_Kind is</text:span></text:p>
        <text:p text:style-name="Preformatted_20_Text"><text:span text:style-name="Source_20_Text"><text:s text:c="6"/>(Integer_Parameter,</text:span></text:p>
        <text:p text:style-name="Preformatted_20_Text"><text:span text:style-name="Source_20_Text"><text:s text:c="7"/>Float_Parameter,</text:span></text:p>
        <text:p text:style-name="Preformatted_20_Text"><text:span text:style-name="Source_20_Text"><text:s text:c="7"/>String_Parameter,</text:span></text:p>
        <text:p text:style-name="Preformatted_20_Text"><text:span text:style-name="Source_20_Text"><text:s text:c="7"/>Boolean_Parameter);</text:span></text:p>
        <text:p text:style-name="Preformatted_20_Text"><text:span text:style-name="Source_20_Text"><text:s text:c="3"/>type SQL_Parameter (Kind : SQL_Parameter_Kind) is record</text:span></text:p>
        <text:p text:style-name="Preformatted_20_Text"><text:span text:style-name="Source_20_Text"><text:s text:c="6"/>case Kind is</text:span></text:p>
        <text:p text:style-name="Preformatted_20_Text"><text:span text:style-name="Source_20_Text"><text:s text:c="9"/>when Integer_Parameter =&gt;</text:span></text:p>
        <text:p text:style-name="Preformatted_20_Text"><text:span text:style-name="Source_20_Text"><text:s text:c="12"/>I : Integer;</text:span></text:p>
        <text:p text:style-name="Preformatted_20_Text"><text:span text:style-name="Source_20_Text"><text:s text:c="9"/>when Float_Parameter =&gt;</text:span></text:p>
        <text:p text:style-name="Preformatted_20_Text"><text:span text:style-name="Source_20_Text"><text:s text:c="12"/>F : Float;</text:span></text:p>
        <text:p text:style-name="Preformatted_20_Text"><text:span text:style-name="Source_20_Text"><text:s text:c="9"/>when String_Parameter =&gt;</text:span></text:p>
        <text:p text:style-name="Preformatted_20_Text"><text:span text:style-name="Source_20_Text"><text:s text:c="12"/>S : Unbounded_String;</text:span></text:p>
        <text:p text:style-name="Preformatted_20_Text"><text:span text:style-name="Source_20_Text"><text:s text:c="9"/>when Boolean_Parameter =&gt;</text:span></text:p>
        <text:p text:style-name="Preformatted_20_Text"><text:span text:style-name="Source_20_Text"><text:s text:c="12"/>B : Boolean;</text:span></text:p>
        <text:p text:style-name="Preformatted_20_Text"><text:span text:style-name="Source_20_Text"><text:s text:c="6"/>end case;</text:span></text:p>
        <text:p text:style-name="Preformatted_20_Text"><text:span text:style-name="Source_20_Text"><text:s text:c="3"/>end record;</text:span></text:p>
        <text:p text:style-name="Preformatted_20_Text"><text:span text:style-name="Source_20_Text"><text:s text:c="3"/>package Parameter_Vectors is</text:span></text:p>
        <text:p text:style-name="Preformatted_20_Text"><text:soft-page-break/><text:span text:style-name="Source_20_Text"><text:s text:c="6"/>new Ada.Containers.Vectors</text:span></text:p>
        <text:p text:style-name="Preformatted_20_Text"><text:span text:style-name="Source_20_Text"><text:s text:c="9"/>(Positive,</text:span></text:p>
        <text:p text:style-name="Preformatted_20_Text"><text:span text:style-name="Source_20_Text"><text:s text:c="10"/>SQL_Parameter);</text:span></text:p>
        <text:p text:style-name="Preformatted_20_Text"><text:span text:style-name="Source_20_Text"><text:s text:c="3"/>type SQL_Fragment is record</text:span></text:p>
        <text:p text:style-name="Preformatted_20_Text"><text:span text:style-name="Source_20_Text"><text:s text:c="6"/>Text : Unbounded_String;</text:span></text:p>
        <text:p text:style-name="Preformatted_20_Text"><text:span text:style-name="Source_20_Text"><text:s text:c="6"/>Parameters : Parameter_Vectors.Vector;</text:span></text:p>
        <text:p text:style-name="Preformatted_20_Text"><text:span text:style-name="Source_20_Text"><text:s text:c="3"/>end record;</text:span></text:p>
        <text:p text:style-name="P1"><text:span text:style-name="Source_20_Text">end SQL;</text:span></text:p>
      </text:section>
      <text:p text:style-name="Text_20_body">This object is the return value of every recursive call.</text:p>
      <text:p text:style-name="Horizontal_20_Line"/>
      <text:h text:style-name="Heading_20_1" text:outline-level="1">Step 9. Dispatcher</text:h>
      <text:p text:style-name="Text_20_body">The recursive compiler becomes pleasantly short.</text:p>
      <text:section text:style-name="Sect2" text:name="Section30">
        <text:p text:style-name="Preformatted_20_Text"><text:bookmark text:name="code-block-viewer29"/><text:span text:style-name="Source_20_Text">function Compile</text:span></text:p>
        <text:p text:style-name="Preformatted_20_Text"><text:span text:style-name="Source_20_Text"><text:s text:c="3"/>(Node : AST_Type)</text:span></text:p>
        <text:p text:style-name="Preformatted_20_Text"><text:span text:style-name="Source_20_Text">return SQL_Fragment</text:span></text:p>
        <text:p text:style-name="Preformatted_20_Text"><text:span text:style-name="Source_20_Text">is</text:span></text:p>
        <text:p text:style-name="Preformatted_20_Text"><text:span text:style-name="Source_20_Text">begin</text:span></text:p>
        <text:p text:style-name="Preformatted_20_Text"><text:span text:style-name="Source_20_Text"><text:s text:c="3"/>case Kind (Node) is</text:span></text:p>
        <text:p text:style-name="Preformatted_20_Text"><text:span text:style-name="Source_20_Text"><text:s text:c="6"/>when NUMBER =&gt;</text:span></text:p>
        <text:p text:style-name="Preformatted_20_Text"><text:span text:style-name="Source_20_Text"><text:s text:c="9"/>return Compile_Number (Node);</text:span></text:p>
        <text:p text:style-name="Preformatted_20_Text"><text:span text:style-name="Source_20_Text"><text:s text:c="6"/>when TEXT =&gt;</text:span></text:p>
        <text:p text:style-name="Preformatted_20_Text"><text:span text:style-name="Source_20_Text"><text:s text:c="9"/>return Compile_String (Node);</text:span></text:p>
        <text:p text:style-name="Preformatted_20_Text"><text:span text:style-name="Source_20_Text"><text:s text:c="6"/>when VARIABLE =&gt;</text:span></text:p>
        <text:p text:style-name="Preformatted_20_Text"><text:span text:style-name="Source_20_Text"><text:s text:c="9"/>return Compile_Identifier (Node);</text:span></text:p>
        <text:p text:style-name="Preformatted_20_Text"><text:span text:style-name="Source_20_Text"><text:s text:c="6"/>when OPERATOR =&gt;</text:span></text:p>
        <text:p text:style-name="Preformatted_20_Text"><text:span text:style-name="Source_20_Text"><text:s text:c="9"/>return Compile_Operator (Node);</text:span></text:p>
        <text:p text:style-name="Preformatted_20_Text"><text:span text:style-name="Source_20_Text"><text:s text:c="6"/>when UNARY_OPERATOR =&gt;</text:span></text:p>
        <text:p text:style-name="Preformatted_20_Text"><text:span text:style-name="Source_20_Text"><text:s text:c="9"/>return Compile_Unary (Node);</text:span></text:p>
        <text:p text:style-name="Preformatted_20_Text"><text:span text:style-name="Source_20_Text"><text:s text:c="3"/>end case;</text:span></text:p>
        <text:p text:style-name="P1"><text:span text:style-name="Source_20_Text">end Compile;</text:span></text:p>
      </text:section>
      <text:p text:style-name="Text_20_body">Each helper is fewer than 20 lines.</text:p>
      <text:p text:style-name="Horizontal_20_Line"/>
      <text:h text:style-name="Heading_20_1" text:outline-level="1">Step 10. Operator compiler</text:h>
      <text:p text:style-name="Text_20_body">This is almost a lookup table.</text:p>
      <text:section text:style-name="Sect2" text:name="Section31">
        <text:p text:style-name="Preformatted_20_Text"><text:bookmark text:name="code-block-viewer30"/><text:span text:style-name="Source_20_Text">case Operator (Node) is</text:span></text:p>
        <text:p text:style-name="Preformatted_20_Text"><text:span text:style-name="Source_20_Text"><text:s text:c="3"/>when '=' =&gt;</text:span></text:p>
        <text:p text:style-name="Preformatted_20_Text"><text:span text:style-name="Source_20_Text"><text:s text:c="6"/>return Binary ("=", Node);</text:span></text:p>
        <text:p text:style-name="Preformatted_20_Text"><text:span text:style-name="Source_20_Text"><text:s text:c="3"/>when '&lt;' =&gt;</text:span></text:p>
        <text:p text:style-name="Preformatted_20_Text"><text:span text:style-name="Source_20_Text"><text:s text:c="6"/>return Binary ("&lt;", Node);</text:span></text:p>
        <text:p text:style-name="Preformatted_20_Text"><text:span text:style-name="Source_20_Text"><text:s text:c="3"/>when '&gt;' =&gt;</text:span></text:p>
        <text:p text:style-name="Preformatted_20_Text"><text:span text:style-name="Source_20_Text"><text:s text:c="6"/>return Binary ("&gt;", Node);</text:span></text:p>
        <text:p text:style-name="Preformatted_20_Text"><text:span text:style-name="Source_20_Text"><text:s text:c="3"/>when OP_LE =&gt;</text:span></text:p>
        <text:p text:style-name="Preformatted_20_Text"><text:span text:style-name="Source_20_Text"><text:s text:c="6"/>return Binary ("&lt;=", Node);</text:span></text:p>
        <text:p text:style-name="Preformatted_20_Text"><text:span text:style-name="Source_20_Text"><text:s text:c="3"/>when OP_GE =&gt;</text:span></text:p>
        <text:p text:style-name="Preformatted_20_Text"><text:span text:style-name="Source_20_Text"><text:s text:c="6"/>return Binary ("&gt;=", Node);</text:span></text:p>
        <text:p text:style-name="Preformatted_20_Text"><text:span text:style-name="Source_20_Text"><text:s text:c="3"/>when OP_NE =&gt;</text:span></text:p>
        <text:p text:style-name="Preformatted_20_Text"><text:soft-page-break/><text:span text:style-name="Source_20_Text"><text:s text:c="6"/>return Binary ("&lt;&gt;", Node);</text:span></text:p>
        <text:p text:style-name="Preformatted_20_Text"><text:span text:style-name="Source_20_Text"><text:s text:c="3"/>when OP_AND =&gt;</text:span></text:p>
        <text:p text:style-name="Preformatted_20_Text"><text:span text:style-name="Source_20_Text"><text:s text:c="6"/>return Binary ("AND", Node);</text:span></text:p>
        <text:p text:style-name="Preformatted_20_Text"><text:span text:style-name="Source_20_Text"><text:s text:c="3"/>when OP_OR =&gt;</text:span></text:p>
        <text:p text:style-name="Preformatted_20_Text"><text:span text:style-name="Source_20_Text"><text:s text:c="6"/>return Binary ("OR", Node);</text:span></text:p>
        <text:p text:style-name="Preformatted_20_Text"><text:span text:style-name="Source_20_Text"><text:s text:c="3"/>when others =&gt;</text:span></text:p>
        <text:p text:style-name="Preformatted_20_Text"><text:span text:style-name="Source_20_Text"><text:s text:c="6"/>raise Unsupported_Filter;</text:span></text:p>
        <text:p text:style-name="P1"><text:span text:style-name="Source_20_Text">end case;</text:span></text:p>
      </text:section>
      <text:p text:style-name="Text_20_body">where</text:p>
      <text:section text:style-name="Sect2" text:name="Section32">
        <text:p text:style-name="Preformatted_20_Text"><text:bookmark text:name="code-block-viewer31"/><text:span text:style-name="Source_20_Text">function Binary</text:span></text:p>
        <text:p text:style-name="Preformatted_20_Text"><text:span text:style-name="Source_20_Text"><text:s text:c="3"/>(SQL_Operator : String;</text:span></text:p>
        <text:p text:style-name="Preformatted_20_Text"><text:span text:style-name="Source_20_Text"><text:s text:c="4"/>Node <text:s text:c="8"/>: AST_Type)</text:span></text:p>
        <text:p text:style-name="P1"><text:span text:style-name="Source_20_Text">return SQL_Fragment;</text:span></text:p>
      </text:section>
      <text:p text:style-name="Text_20_body">contains almost all of the common logic.</text:p>
      <text:p text:style-name="Horizontal_20_Line"/>
      <text:h text:style-name="Heading_20_1" text:outline-level="1">Step 11. Why this scales well</text:h>
      <text:p text:style-name="Text_20_body">The interesting part of OPTIMADE is not the scalar comparisons; it's operators such as:</text:p>
      <text:section text:style-name="Sect2" text:name="Section33">
        <text:p text:style-name="Preformatted_20_Text"><text:bookmark text:name="code-block-viewer32"/><text:span text:style-name="Source_20_Text">HAS</text:span></text:p>
        <text:p text:style-name="Preformatted_20_Text"><text:span text:style-name="Source_20_Text">HAS ANY</text:span></text:p>
        <text:p text:style-name="Preformatted_20_Text"><text:span text:style-name="Source_20_Text">HAS ALL</text:span></text:p>
        <text:p text:style-name="Preformatted_20_Text"><text:span text:style-name="Source_20_Text">HAS ONLY</text:span></text:p>
        <text:p text:style-name="Preformatted_20_Text"><text:span text:style-name="Source_20_Text">LENGTH</text:span></text:p>
        <text:p text:style-name="Preformatted_20_Text"><text:span text:style-name="Source_20_Text">CONTAINS</text:span></text:p>
        <text:p text:style-name="Preformatted_20_Text"><text:span text:style-name="Source_20_Text">STARTS WITH</text:span></text:p>
        <text:p text:style-name="P1"><text:span text:style-name="Source_20_Text">ENDS WITH</text:span></text:p>
      </text:section>
      <text:p text:style-name="Text_20_body">With this architecture, adding support is localized. For example, in a MySQL backend:</text:p>
      <text:section text:style-name="Sect2" text:name="Section34">
        <text:p text:style-name="Preformatted_20_Text"><text:bookmark text:name="code-block-viewer33"/><text:span text:style-name="Source_20_Text">HAS</text:span></text:p>
        <text:p text:style-name="Preformatted_20_Text"><text:span text:style-name="Source_20_Text">↓</text:span></text:p>
        <text:p text:style-name="P1"><text:span text:style-name="Source_20_Text">JSON_CONTAINS(column, ?)</text:span></text:p>
      </text:section>
      <text:p text:style-name="Text_20_body">whereas in PostgreSQL:</text:p>
      <text:section text:style-name="Sect2" text:name="Section35">
        <text:p text:style-name="P1"><text:bookmark text:name="code-block-viewer34"/><text:span text:style-name="Source_20_Text">column @&gt; ARRAY[?]</text:span></text:p>
      </text:section>
      <text:p text:style-name="Text_20_body">or with normalized tables:</text:p>
      <text:section text:style-name="Sect2" text:name="Section36">
        <text:p text:style-name="Preformatted_20_Text"><text:bookmark text:name="code-block-viewer35"/><text:span text:style-name="Source_20_Text">EXISTS (</text:span></text:p>
        <text:p text:style-name="Preformatted_20_Text"><text:span text:style-name="Source_20_Text"><text:s text:c="4"/>SELECT 1</text:span></text:p>
        <text:p text:style-name="Preformatted_20_Text"><text:span text:style-name="Source_20_Text"><text:s text:c="4"/>FROM entry_elements</text:span></text:p>
        <text:p text:style-name="Preformatted_20_Text"><text:span text:style-name="Source_20_Text"><text:s text:c="4"/>WHERE ...</text:span></text:p>
        <text:p text:style-name="P1"><text:span text:style-name="Source_20_Text">)</text:span></text:p>
      </text:section>
      <text:p text:style-name="Text_20_body">The AST is unchanged; only the backend implementation differs.</text:p>
      <text:p text:style-name="Horizontal_20_Line"/>
      <text:h text:style-name="Heading_20_2" text:outline-level="2"><text:soft-page-break/>One additional design recommendation</text:h>
      <text:p text:style-name="Text_20_body">One thing I'd change in your AST before building the compiler is to avoid storing identifiers as raw strings alone. After parsing, add a semantic resolution pass that annotates each <text:span text:style-name="Source_20_Text">VARIABLE</text:span> node with metadata such as column name, data type, whether it's nullable, and whether it's scalar or a list. Then the SQL compiler no longer has to perform name lookups or type inference—it simply consumes a typed AST. This separation of parsing, semantic analysis, and code generation is the same approach used by most mature language compilers and will make supporting the full OPTIMADE filter language (including relationships, JSON-backed properties, and list operators) much cleaner.</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Hindi1" svg:font-family="'Lohit Hind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erif CJK SC" svg:font-family="'Noto Serif CJK SC'"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lt" fo:country="LT"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lt" fo:country="LT"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Saulius Grazulis</meta:initial-creator>
    <meta:creation-date>2012-12-11T13:24:26</meta:creation-date>
    <meta:generator>LibreOffice/6.4.7.2$Linux_X86_64 LibreOffice_project/40$Build-2</meta:generator>
    <dc:date>2026-06-28T11:40:18.185860582</dc:date>
    <meta:editing-duration>PT4M9S</meta:editing-duration>
    <meta:editing-cycles>6</meta:editing-cycles>
    <meta:document-statistic meta:table-count="0" meta:image-count="0" meta:object-count="1" meta:page-count="11" meta:paragraph-count="379" meta:word-count="1574" meta:character-count="11557" meta:non-whitespace-character-count="8975"/>
  </office:meta>
</office:document-meta>
</file>